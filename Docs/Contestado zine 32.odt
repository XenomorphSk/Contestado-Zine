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40pt" officeooo:rsid="000ff0de" officeooo:paragraph-rsid="000ff0de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ff0de" officeooo:paragraph-rsid="000ff0de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ff0de" officeooo:paragraph-rsid="000ff0de" style:font-size-asian="12.25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I MARIA DA PENHA EM DOIS BAIRROS: CIC E JARDIM SCHAFFER</text:p>
      <text:p text:style-name="P3"/>
      <text:p text:style-name="P3"/>
      <text:p text:style-name="P3"><text:tab/><text:tab/>-Boa tarde, o que está acontecendo aqui?</text:p>
      <text:p text:style-name="P3"><text:tab/><text:tab/><text:span text:style-name="T1">(a mulher de mãos dadas com dois filhos está com o olho roxo e um sangramento no nariz) –</text:span><text:span text:style-name="T2"> Esse filho da puta bateu na minha cara na frente das minhas crianças.</text:span></text:p>
      <text:p text:style-name="P3"><text:span text:style-name="T2"><text:tab/><text:tab/>- O quê?</text:span></text:p>
      <text:p text:style-name="P3"><text:span text:style-name="T2"><text:tab/><text:tab/>- É isso mesmo seu polícia. O desgraçado fica o dia inteiro bebendo e chega em casa e me bate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6:23:02.286594675</meta:creation-date>
    <meta:print-date>2021-09-15T16:23:42.149531312</meta:print-date>
    <dc:date>2021-09-15T16:38:51.947593317</dc:date>
    <meta:editing-duration>PT15M50S</meta:editing-duration>
    <meta:editing-cycles>1</meta:editing-cycles>
    <meta:document-statistic meta:table-count="0" meta:image-count="0" meta:object-count="0" meta:page-count="1" meta:paragraph-count="5" meta:word-count="72" meta:character-count="365" meta:non-whitespace-character-count="289"/>
    <meta:generator>LibreOffice/5.1.6.2$Linux_X86_64 LibreOffice_project/10m0$Build-2</meta:generator>
  </office:meta>
</office:document-meta>
</file>